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FD00000109CC21185D.png" manifest:media-type="image/png"/>
  <manifest:file-entry manifest:full-path="Pictures/100000010000039A000000F63E7AD6E5.png" manifest:media-type="image/png"/>
  <manifest:file-entry manifest:full-path="Pictures/1000000100000337000001115FD5E02B.png" manifest:media-type="image/png"/>
  <manifest:file-entry manifest:full-path="Pictures/10000001000003210000011BDD65B868.png" manifest:media-type="image/png"/>
  <manifest:file-entry manifest:full-path="Pictures/1000000100000392000000EDF4315716.png" manifest:media-type="image/png"/>
  <manifest:file-entry manifest:full-path="Pictures/10000001000003A2000000F47710204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3" style:family="paragraph" style:parent-style-name="Standard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margin-top="0cm" fo:margin-bottom="0.282cm" style:contextual-spacing="false" fo:break-before="pag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text-properties style:font-name="Times New Roman" officeooo:paragraph-rsid="000ecf2a"/>
    </style:style>
    <style:style style:name="P7" style:family="paragraph" style:parent-style-name="Standard">
      <style:text-properties style:font-name="Times New Roman" fo:language="en" fo:country="US" officeooo:paragraph-rsid="000ecf2a" style:font-name-complex="Times New Roman1"/>
    </style:style>
    <style:style style:name="P8" style:family="paragraph" style:parent-style-name="Standard">
      <style:text-properties style:font-name="Times New Roman" fo:language="en" fo:country="US" fo:font-weight="bold" style:font-weight-asian="bold" style:font-name-complex="Times New Roman1" style:font-weight-complex="bold"/>
    </style:style>
    <style:style style:name="P9" style:family="paragraph" style:parent-style-name="Standard">
      <style:text-properties style:font-name="Times New Roman" officeooo:paragraph-rsid="000ecf2a" style:font-name-complex="Times New Roman1"/>
    </style:style>
    <style:style style:name="P10" style:family="paragraph" style:parent-style-name="Standard">
      <style:text-properties style:font-name="Times New Roman" fo:font-weight="bold" officeooo:paragraph-rsid="000dcdc7" style:font-weight-asian="bold" style:font-name-complex="Times New Roman1" style:font-weight-complex="bold"/>
    </style:style>
    <style:style style:name="P11" style:family="paragraph" style:parent-style-name="Standard">
      <style:text-properties style:font-name="Times New Roman" officeooo:paragraph-rsid="00105098"/>
    </style:style>
    <style:style style:name="P12" style:family="paragraph" style:parent-style-name="Standard">
      <style:text-properties style:font-name="Times New Roman" fo:language="en" fo:country="US" officeooo:paragraph-rsid="00105098" style:font-name-complex="Times New Roman1"/>
    </style:style>
    <style:style style:name="P13" style:family="paragraph" style:parent-style-name="Standard">
      <style:text-properties style:font-name="Times New Roman" fo:language="en" fo:country="US" style:font-name-complex="Times New Roman1"/>
    </style:style>
    <style:style style:name="P14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15" style:family="paragraph" style:parent-style-name="Standard">
      <style:paragraph-properties fo:break-before="pag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" style:family="text">
      <style:text-properties fo:font-size="16pt" fo:font-weight="bold" style:font-size-asian="16pt" style:font-weight-asian="bold" style:font-name-complex="Times New Roman1" style:font-size-complex="16pt" style:font-weight-complex="bold"/>
    </style:style>
    <style:style style:name="T2" style:family="text">
      <style:text-properties fo:font-size="16pt" fo:font-weight="bold" officeooo:rsid="000dcdc7" style:font-size-asian="16pt" style:font-weight-asian="bold" style:font-name-complex="Times New Roman1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cdc7" style:font-weight-asian="bold" style:font-weight-complex="bold"/>
    </style:style>
    <style:style style:name="T5" style:family="text">
      <style:text-properties fo:language="en" fo:country="US" fo:font-weight="bold" style:font-weight-asian="bold" style:font-name-complex="Times New Roman1" style:font-weight-complex="bold"/>
    </style:style>
    <style:style style:name="T6" style:family="text">
      <style:text-properties fo:language="en" fo:country="US" style:font-name-complex="Times New Roman1"/>
    </style:style>
    <style:style style:name="T7" style:family="text">
      <style:text-properties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.656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WEEK 1</text:p>
      <text:p text:style-name="P2">MODULE 3 – PL SQL PROGRAMM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NAME <text:s text:c="12"/>: </text:span><text:span text:style-name="T2">Nishanth P</text:span></text:p>
      <text:p text:style-name="P4"><text:span text:style-name="T1">SUPERSET ID: 6</text:span><text:span text:style-name="T2">737778</text:span></text:p>
      <text:p text:style-name="P3"/>
      <text:p text:style-name="P5">EXERCISE 1: CONTROL STRUCTURES</text:p>
      <text:p text:style-name="P6"><text:span text:style-name="T3">Scenario </text:span><text:span text:style-name="T4">1</text:span><text:span text:style-name="T3">:</text:span></text:p>
      <text:p text:style-name="P7">The bank wants to apply a discount to loan interest rates for customers above 60 years old.</text:p>
      <text:p text:style-name="P4"><text:span text:style-name="T5">Solution :</text:span></text:p>
      <text:p text:style-name="P8">Query:</text:p>
      <text:p text:style-name="P9">BEGIN<text:line-break/>FOR cus IN (<text:line-break/>SELECT CUSTOMERID, DOB<text:line-break/>FROM CUSTOMERS<text:line-break/>) LOOP<text:line-break/><text:line-break/>IF MONTHS_BETWEEN(SYSDATE, cus.DOB)/12 &gt; 60 THEN<text:line-break/><text:line-break/>UPDATE LOANS<text:line-break/>SET INTERESTRATE = INTERESTRATE - 1<text:line-break/>WHERE CUSTOMERID = cus.CUSTOMERID;<text:line-break/><text:line-break/>DBMS_OUTPUT.PUT_LINE(<text:line-break/>'Discount applied for Customer I</text:p>
      <text:p text:style-name="P9">cus.CUSTOMERID<text:line-break/>);<text:line-break/><text:line-break/>END IF;<text:line-break/><text:line-break/>END LOOP;<text:line-break/><text:line-break/>COMMIT;<text:line-break/>END;<text:line-break/>/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Output:</text:p>
      <text:p text:style-name="P4"><draw:frame draw:style-name="fr1" draw:name="Picture 1" text:anchor-type="as-char" svg:y="-6.121cm" svg:width="15.921cm" svg:height="4.87cm" draw:z-index="0"><draw:image xlink:href="Pictures/10000001000002FD00000109CC21185D.png" xlink:type="simple" xlink:show="embed" xlink:actuate="onLoad" draw:mime-type="image/png"/></draw:frame></text:p>
      <text:p text:style-name="P11"><text:span text:style-name="T5">Scenario 2:</text:span><text:span text:style-name="T5"/></text:p>
      <text:p text:style-name="P12">A customer can be promoted to VIP status based on their balance.</text:p>
      <text:p text:style-name="P8">Query:</text:p>
      <text:p text:style-name="P13">BEGIN</text:p>
      <text:p text:style-name="P13"><text:s text:c="4"/>FOR cus IN (</text:p>
      <text:p text:style-name="P13"><text:s text:c="8"/>SELECT CUSTOMERID, BALANCE</text:p>
      <text:p text:style-name="P13"><text:s text:c="8"/>FROM CUSTOMERS</text:p>
      <text:p text:style-name="P13"><text:s text:c="4"/>) LOOP</text:p>
      <text:p text:style-name="P13"/>
      <text:p text:style-name="P13"><text:s text:c="8"/>IF cus.BALANCE &gt; 10000 THEN</text:p>
      <text:p text:style-name="P13"/>
      <text:p text:style-name="P13"><text:s text:c="12"/>UPDATE CUSTOMERS</text:p>
      <text:p text:style-name="P13"><text:s text:c="12"/>SET ISVIP = 'TRUE'</text:p>
      <text:p text:style-name="P13"><text:s text:c="12"/>WHERE CUSTOMERID = cus.CUSTOMERID;</text:p>
      <text:p text:style-name="P13"/>
      <text:p text:style-name="P13"><text:s text:c="12"/>DBMS_OUTPUT.PUT_LINE(</text:p>
      <text:p text:style-name="P13"><text:s text:c="16"/>'VIP Status Granted to Customer ID: ' ||</text:p>
      <text:p text:style-name="P4"><text:span text:style-name="T6"><text:s text:c="16"/>cus.CUSTOMERID</text:span></text:p>
      <text:p text:style-name="P13"><text:s text:c="12"/>);</text:p>
      <text:p text:style-name="P13"/>
      <text:p text:style-name="P13"><text:soft-page-break/><text:s text:c="8"/>END IF;</text:p>
      <text:p text:style-name="P13"/>
      <text:p text:style-name="P13"><text:s text:c="4"/>END LOOP;</text:p>
      <text:p text:style-name="P13"/>
      <text:p text:style-name="P13"><text:s text:c="4"/>COMMIT;</text:p>
      <text:p text:style-name="P13">END;</text:p>
      <text:p text:style-name="P13">/</text:p>
      <text:p text:style-name="P8">Output:</text:p>
      <text:p text:style-name="P4"><draw:frame draw:style-name="fr2" draw:name="Image2" text:anchor-type="as-char" svg:width="15.921cm" svg:height="5.281cm" draw:z-index="1"><draw:image xlink:href="Pictures/1000000100000337000001115FD5E02B.png" xlink:type="simple" xlink:show="embed" xlink:actuate="onLoad" draw:mime-type="image/png"/></draw:frame></text:p>
      <text:p text:style-name="P11"><text:span text:style-name="T5">Scenario 3:</text:span><text:span text:style-name="T5"/></text:p>
      <text:p text:style-name="P12">The bank wants to send reminders to customers whose loans are due within the next 30 days.</text:p>
      <text:p text:style-name="P8">Query:</text:p>
      <text:p text:style-name="P1">BEGIN</text:p>
      <text:p text:style-name="P1"><text:s text:c="4"/>FOR loan_rec IN (</text:p>
      <text:p text:style-name="P1"><text:s text:c="8"/>SELECT LOANID,</text:p>
      <text:p text:style-name="P1"><text:s text:c="15"/>CUSTOMERID,</text:p>
      <text:p text:style-name="P1"><text:s text:c="15"/>DUEDATE</text:p>
      <text:p text:style-name="P1"><text:s text:c="8"/>FROM LOANS</text:p>
      <text:p text:style-name="P1"><text:s text:c="8"/>WHERE DUEDATE BETWEEN SYSDATE</text:p>
      <text:p text:style-name="P1"><text:s text:c="25"/>AND SYSDATE + 30</text:p>
      <text:p text:style-name="P1"><text:s text:c="4"/>) LOOP</text:p>
      <text:p text:style-name="P1"/>
      <text:p text:style-name="P1"><text:s text:c="8"/>DBMS_OUTPUT.PUT_LINE(</text:p>
      <text:p text:style-name="P1"><text:soft-page-break/><text:s text:c="12"/>'Reminder: Loan ID ' ||</text:p>
      <text:p text:style-name="P1"><text:s text:c="12"/>loan_rec.LOANID ||</text:p>
      <text:p text:style-name="P1"><text:s text:c="12"/>' for Customer ID ' ||</text:p>
      <text:p text:style-name="P1"><text:s text:c="12"/>loan_rec.CUSTOMERID ||</text:p>
      <text:p text:style-name="P1"><text:s text:c="12"/>' is due on ' ||</text:p>
      <text:p text:style-name="P1"><text:s text:c="12"/>TO_CHAR(loan_rec.DUEDATE,'DD-MON-YYYY')</text:p>
      <text:p text:style-name="P1"><text:s text:c="8"/>);</text:p>
      <text:p text:style-name="P1"/>
      <text:p text:style-name="P1"><text:s text:c="4"/>END LOOP;</text:p>
      <text:p text:style-name="P1">END;</text:p>
      <text:p text:style-name="P1">/</text:p>
      <text:p text:style-name="P14">Output:</text:p>
      <text:p text:style-name="P4"><draw:frame draw:style-name="fr2" draw:name="Image3" text:anchor-type="as-char" svg:width="15.921cm" svg:height="5.625cm" draw:z-index="2"><draw:image xlink:href="Pictures/10000001000003210000011BDD65B868.png" xlink:type="simple" xlink:show="embed" xlink:actuate="onLoad" draw:mime-type="image/png"/></draw:frame></text:p>
      <text:p text:style-name="P1"/>
      <text:p text:style-name="P15">EXERCISE 3: STORED PROCEDURES</text:p>
      <text:p text:style-name="P8"/>
      <text:p text:style-name="P11"><text:span text:style-name="T5">Scenario 1:</text:span><text:span text:style-name="T5"/></text:p>
      <text:p text:style-name="P12">The bank needs to process monthly interest for all savings accounts.</text:p>
      <text:p text:style-name="P8">Query:</text:p>
      <text:p text:style-name="P13">CREATE OR REPLACE PROCEDURE ProcessMonthlyInterest</text:p>
      <text:p text:style-name="P13">AS</text:p>
      <text:p text:style-name="P13">BEGIN</text:p>
      <text:p text:style-name="P13"><text:s text:c="4"/>UPDATE ACCOUNTS</text:p>
      <text:p text:style-name="P13"><text:s text:c="4"/>SET BALANCE = BALANCE + (BALANCE * 0.01)</text:p>
      <text:p text:style-name="P13"><text:s text:c="4"/>WHERE ACCOUNTTYPE = 'SAVINGS';</text:p>
      <text:p text:style-name="P13"/>
      <text:p text:style-name="P13"><text:s text:c="4"/>COMMIT;</text:p>
      <text:p text:style-name="P13"/>
      <text:p text:style-name="P13"><text:s text:c="4"/>DBMS_OUTPUT.PUT_LINE('Monthly interest processed successfully.');</text:p>
      <text:p text:style-name="P13">END;</text:p>
      <text:p text:style-name="P13">/</text:p>
      <text:p text:style-name="P8">Output:</text:p>
      <text:p text:style-name="P4"><draw:frame draw:style-name="fr2" draw:name="Image7" text:anchor-type="as-char" svg:width="15.921cm" svg:height="4.128cm" draw:z-index="3"><draw:image xlink:href="Pictures/1000000100000392000000EDF4315716.png" xlink:type="simple" xlink:show="embed" xlink:actuate="onLoad" draw:mime-type="image/png"/></draw:frame></text:p>
      <text:p text:style-name="P4"><text:span text:style-name="T5">Scenario 2:</text:span><text:span text:style-name="T6"> The bank wants to implement a bonus scheme for employees based on their performance.</text:span></text:p>
      <text:p text:style-name="P8">Query:</text:p>
      <text:p text:style-name="P13">CREATE OR REPLACE PROCEDURE UpdateEmployeeBonus(</text:p>
      <text:p text:style-name="P13"><text:s text:c="4"/>p_department IN VARCHAR2,</text:p>
      <text:p text:style-name="P13"><text:s text:c="4"/>p_bonus_percent IN NUMBER</text:p>
      <text:p text:style-name="P13"><text:soft-page-break/>)</text:p>
      <text:p text:style-name="P4"><text:span text:style-name="T6">AS</text:span></text:p>
      <text:p text:style-name="P13">BEGIN</text:p>
      <text:p text:style-name="P13"><text:s text:c="4"/>UPDATE EMPLOYEES</text:p>
      <text:p text:style-name="P13"><text:s text:c="4"/>SET SALARY = SALARY +</text:p>
      <text:p text:style-name="P13"><text:s text:c="17"/>(SALARY * p_bonus_percent / 100)</text:p>
      <text:p text:style-name="P13"><text:s text:c="4"/>WHERE DEPARTMENT = p_department;</text:p>
      <text:p text:style-name="P13"/>
      <text:p text:style-name="P13"><text:s text:c="4"/>COMMIT;</text:p>
      <text:p text:style-name="P13"/>
      <text:p text:style-name="P13"><text:s text:c="4"/>DBMS_OUTPUT.PUT_LINE(</text:p>
      <text:p text:style-name="P13"><text:s text:c="8"/>'Bonus updated for department: ' ||</text:p>
      <text:p text:style-name="P13"><text:s text:c="8"/>p_department</text:p>
      <text:p text:style-name="P13"><text:s text:c="4"/>);</text:p>
      <text:p text:style-name="P13">END;</text:p>
      <text:p text:style-name="P13">/</text:p>
      <text:p text:style-name="P8">Output:</text:p>
      <text:p text:style-name="P4"><draw:frame draw:style-name="fr2" draw:name="Image8" text:anchor-type="as-char" svg:width="15.921cm" svg:height="4.247cm" draw:z-index="4"><draw:image xlink:href="Pictures/100000010000039A000000F63E7AD6E5.png" xlink:type="simple" xlink:show="embed" xlink:actuate="onLoad" draw:mime-type="image/png"/></draw:frame></text:p>
      <text:p text:style-name="P4"><text:span text:style-name="T5">Scenario 3:</text:span><text:span text:style-name="T6"> Customers should be able to transfer funds between their accounts.</text:span></text:p>
      <text:p text:style-name="P8">Query:</text:p>
      <text:p text:style-name="P13">CREATE OR REPLACE PROCEDURE TransferFunds(</text:p>
      <text:p text:style-name="P13"><text:s text:c="4"/>p_from_account IN NUMBER,</text:p>
      <text:p text:style-name="P13"><text:s text:c="4"/>p_to_account IN NUMBER,</text:p>
      <text:p text:style-name="P13"><text:s text:c="4"/>p_amount IN NUMBER</text:p>
      <text:p text:style-name="P13">)</text:p>
      <text:p text:style-name="P13"><text:soft-page-break/>AS</text:p>
      <text:p text:style-name="P4"><text:span text:style-name="T6"><text:s text:c="4"/>v_balance NUMBER;</text:span></text:p>
      <text:p text:style-name="P13">BEGIN</text:p>
      <text:p text:style-name="P13"/>
      <text:p text:style-name="P13"><text:s text:c="4"/>SELECT BALANCE</text:p>
      <text:p text:style-name="P13"><text:s text:c="4"/>INTO v_balance</text:p>
      <text:p text:style-name="P13"><text:s text:c="4"/>FROM ACCOUNTS</text:p>
      <text:p text:style-name="P13"><text:s text:c="4"/>WHERE ACCOUNTID = p_from_account;</text:p>
      <text:p text:style-name="P13"/>
      <text:p text:style-name="P13"><text:s text:c="4"/>IF v_balance &gt;= p_amount THEN</text:p>
      <text:p text:style-name="P13"/>
      <text:p text:style-name="P13"><text:s text:c="8"/>UPDATE ACCOUNTS</text:p>
      <text:p text:style-name="P13"><text:s text:c="8"/>SET BALANCE = BALANCE - p_amount</text:p>
      <text:p text:style-name="P13"><text:s text:c="8"/>WHERE ACCOUNTID = p_from_account;</text:p>
      <text:p text:style-name="P13"/>
      <text:p text:style-name="P13"><text:s text:c="8"/>UPDATE ACCOUNTS</text:p>
      <text:p text:style-name="P13"><text:s text:c="8"/>SET BALANCE = BALANCE + p_amount</text:p>
      <text:p text:style-name="P13"><text:s text:c="8"/>WHERE ACCOUNTID = p_to_account;</text:p>
      <text:p text:style-name="P13"/>
      <text:p text:style-name="P13"><text:s text:c="8"/>COMMIT;</text:p>
      <text:p text:style-name="P13"/>
      <text:p text:style-name="P13"><text:s text:c="8"/>DBMS_OUTPUT.PUT_LINE(</text:p>
      <text:p text:style-name="P13"><text:s text:c="12"/>'Transfer Successful'</text:p>
      <text:p text:style-name="P13"><text:s text:c="8"/>);</text:p>
      <text:p text:style-name="P13"/>
      <text:p text:style-name="P13"><text:s text:c="4"/>ELSE</text:p>
      <text:p text:style-name="P13"/>
      <text:p text:style-name="P13"><text:s text:c="8"/>DBMS_OUTPUT.PUT_LINE(</text:p>
      <text:p text:style-name="P13"><text:s text:c="12"/>'Insufficient Balance'</text:p>
      <text:p text:style-name="P13"><text:soft-page-break/><text:s text:c="8"/>);</text:p>
      <text:p text:style-name="P13"/>
      <text:p text:style-name="P13"><text:s text:c="4"/>END IF;</text:p>
      <text:p text:style-name="P13"/>
      <text:p text:style-name="P13">EXCEPTION</text:p>
      <text:p text:style-name="P13"><text:s text:c="4"/>WHEN NO_DATA_FOUND THEN</text:p>
      <text:p text:style-name="P13"><text:s text:c="8"/>DBMS_OUTPUT.PUT_LINE(</text:p>
      <text:p text:style-name="P13"><text:s text:c="12"/>'Account Not Found'</text:p>
      <text:p text:style-name="P13"><text:s text:c="8"/>);</text:p>
      <text:p text:style-name="P13">END;</text:p>
      <text:p text:style-name="P13">/</text:p>
      <text:p text:style-name="P8">Output:</text:p>
      <text:p text:style-name="P4"><draw:frame draw:style-name="fr2" draw:name="Image9" text:anchor-type="as-char" svg:width="15.921cm" svg:height="4.177cm" draw:z-index="5"><draw:image xlink:href="Pictures/10000001000003A2000000F47710204B.png" xlink:type="simple" xlink:show="embed" xlink:actuate="onLoad" draw:mime-type="image/png"/></draw:frame></text:p>
      <text:p text:style-name="P13"/>
      <text:p text:style-name="P1"/>
      <text:p text:style-name="P1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n" fo:country="IN" style:letter-kerning="true" style:font-name-asian="Aptos1" style:font-size-asian="12pt" style:language-asian="en" style:country-asian="US" style:font-name-complex="Lath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IN" style:letter-kerning="true" style:font-name-asian="Aptos1" style:font-size-asian="12pt" style:language-asian="en" style:country-asian="US" style:font-name-complex="Lath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Latha" style:font-family-complex="Lath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Latha" style:font-family-complex="Lath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Latha" style:font-family-complex="Lath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Latha" style:font-family-complex="Lath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Latha" style:font-family-complex="Lath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Latha" style:font-family-complex="Lath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Latha" style:font-family-complex="Lath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Latha" style:font-family-complex="Lath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Latha" style:font-family-complex="Lath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Latha" style:font-family-complex="Lath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Latha" style:font-family-complex="Lath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Latha" style:font-family-complex="Lath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Latha" style:font-family-complex="Lath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Latha" style:font-family-complex="Lath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Latha" style:font-family-complex="Lath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Latha" style:font-family-complex="Lath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Latha" style:font-family-complex="Lath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Latha" style:font-family-complex="Lath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Latha" style:font-family-complex="Lath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Latha" style:font-family-complex="Lath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Latha" style:font-family-complex="Lath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Latha" style:font-family-complex="Lath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="1.676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NANTH KARTHIK</meta:initial-creator>
    <meta:editing-cycles>5</meta:editing-cycles>
    <meta:creation-date>2026-06-29T16:34:00</meta:creation-date>
    <dc:date>2026-06-29T23:05:03.181102400</dc:date>
    <meta:editing-duration>PT14M34S</meta:editing-duration>
    <meta:generator>LibreOffice/26.2.4.2$Windows_X86_64 LibreOffice_project/0229ac93fcf0d7cbc6376066c6f35021cef002dc</meta:generator>
    <meta:document-statistic meta:table-count="0" meta:image-count="6" meta:object-count="0" meta:page-count="9" meta:paragraph-count="137" meta:word-count="419" meta:character-count="3304" meta:non-whitespace-character-count="2405"/>
    <meta:user-defined meta:name="AppVersion">16.0000</meta:user-defined>
    <meta:template xlink:type="simple" xlink:actuate="onRequest" xlink:title="Normal" xlink:href=""/>
  </office:meta>
</office:document-meta>
</file>